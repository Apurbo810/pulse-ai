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Preformatted_20_Text">
      <style:paragraph-properties fo:margin-top="0in" fo:margin-bottom="0.1965in" style:contextual-spacing="false"/>
    </style:style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ince I know your background (React, TypeScript, Node.js, NestJS, and some desktop app experience), I <text:span text:style-name="Strong_20_Emphasis">wouldn't start with AI first</text:span>. I'd build the desktop application and monitoring features before adding the LLM.</text:p>
      <text:p text:style-name="Text_20_body">Here's the roadmap I'd follow.</text:p>
      <text:p text:style-name="Horizontal_20_Line"/>
      <text:h text:style-name="Heading_20_1" text:outline-level="1">Phase 1: Learn desktop development (1 week)</text:h>
      <text:p text:style-name="Text_20_body">Since your UI skills are already strong, learn one desktop framework.</text:p>
      <text:p text:style-name="Text_20_body">I'd recommend <text:span text:style-name="Strong_20_Emphasis">Electron</text:span> first because:</text:p>
      <text:list text:style-name="L1">
        <text:list-item>
          <text:p text:style-name="P1">You already know React.</text:p>
        </text:list-item>
        <text:list-item>
          <text:p text:style-name="P1">Huge ecosystem.</text:p>
        </text:list-item>
        <text:list-item>
          <text:p text:style-name="P1">Lots of tutorials.</text:p>
        </text:list-item>
      </text:list>
      <text:p text:style-name="Text_20_body">Later, if you want lower RAM usage, you can migrate to <text:span text:style-name="Strong_20_Emphasis">Tauri</text:span>.</text:p>
      <text:p text:style-name="Text_20_body">Build a simple app with:</text:p>
      <text:list text:style-name="L2">
        <text:list-item>
          <text:p text:style-name="P2">React</text:p>
        </text:list-item>
        <text:list-item>
          <text:p text:style-name="P2">TypeScript</text:p>
        </text:list-item>
        <text:list-item>
          <text:p text:style-name="P2">Electron</text:p>
        </text:list-item>
      </text:list>
      <text:p text:style-name="Text_20_body">Learn:</text:p>
      <text:list text:style-name="L3">
        <text:list-item>
          <text:p text:style-name="P3">IPC (communication between UI and backend)</text:p>
        </text:list-item>
        <text:list-item>
          <text:p text:style-name="P3">Tray icon</text:p>
        </text:list-item>
        <text:list-item>
          <text:p text:style-name="P3">Notifications</text:p>
        </text:list-item>
        <text:list-item>
          <text:p text:style-name="P3">Auto start</text:p>
        </text:list-item>
        <text:list-item>
          <text:p text:style-name="P3">Global shortcuts</text:p>
        </text:list-item>
      </text:list>
      <text:p text:style-name="Horizontal_20_Line"/>
      <text:h text:style-name="Heading_20_1" text:outline-level="1">Phase 2: Monitor the PC (1–2 weeks)</text:h>
      <text:p text:style-name="Text_20_body">This is the core of your app.</text:p>
      <text:p text:style-name="Text_20_body">Use the <text:span text:style-name="Source_20_Text">systeminformation</text:span> npm package.</text:p>
      <text:p text:style-name="Text_20_body">Collect:</text:p>
      <text:list text:style-name="L4">
        <text:list-item>
          <text:p text:style-name="P4">CPU usage</text:p>
        </text:list-item>
        <text:list-item>
          <text:p text:style-name="P4">RAM usage</text:p>
        </text:list-item>
        <text:list-item>
          <text:p text:style-name="P4">GPU usage</text:p>
        </text:list-item>
        <text:list-item>
          <text:p text:style-name="P4"><text:soft-page-break/>VRAM</text:p>
        </text:list-item>
        <text:list-item>
          <text:p text:style-name="P4">Temperatures</text:p>
        </text:list-item>
        <text:list-item>
          <text:p text:style-name="P4">Disk usage</text:p>
        </text:list-item>
        <text:list-item>
          <text:p text:style-name="P4">Running processes</text:p>
        </text:list-item>
        <text:list-item>
          <text:p text:style-name="P4">Network speed</text:p>
        </text:list-item>
      </text:list>
      <text:p text:style-name="Text_20_body">Display everything in a dashboard.</text:p>
      <text:p text:style-name="Text_20_body">Example:</text:p>
      <text:p text:style-name="Preformatted_20_Text"><text:span text:style-name="Source_20_Text">CPU: 27%</text:span></text:p>
      <text:p text:style-name="Preformatted_20_Text"/>
      <text:p text:style-name="Preformatted_20_Text"><text:span text:style-name="Source_20_Text">RAM: 8.3 / 16 GB</text:span></text:p>
      <text:p text:style-name="Preformatted_20_Text"/>
      <text:p text:style-name="Preformatted_20_Text"><text:span text:style-name="Source_20_Text">GPU: GTX 1650</text:span></text:p>
      <text:p text:style-name="Preformatted_20_Text"><text:span text:style-name="Source_20_Text">Usage: 45%</text:span></text:p>
      <text:p text:style-name="Preformatted_20_Text"/>
      <text:p text:style-name="Preformatted_20_Text"><text:span text:style-name="Source_20_Text">VRAM: 2.7 / 4 GB</text:span></text:p>
      <text:p text:style-name="Preformatted_20_Text"/>
      <text:p text:style-name="Preformatted_20_Text"><text:span text:style-name="Source_20_Text">Top Process:</text:span></text:p>
      <text:p text:style-name="P5"><text:span text:style-name="Source_20_Text">chrome.exe</text:span></text:p>
      <text:p text:style-name="Horizontal_20_Line"/>
      <text:h text:style-name="Heading_20_1" text:outline-level="1">Phase 3: Detect games and apps</text:h>
      <text:p text:style-name="Text_20_body">Learn how to detect:</text:p>
      <text:list text:style-name="L5">
        <text:list-item>
          <text:p text:style-name="P6">Valorant</text:p>
        </text:list-item>
        <text:list-item>
          <text:p text:style-name="P6">Marvel Rivals</text:p>
        </text:list-item>
        <text:list-item>
          <text:p text:style-name="P6">VS Code</text:p>
        </text:list-item>
        <text:list-item>
          <text:p text:style-name="P6">Chrome</text:p>
        </text:list-item>
      </text:list>
      <text:p text:style-name="Text_20_body">When a game starts:</text:p>
      <text:p text:style-name="P5"><text:span text:style-name="Source_20_Text">Gaming Mode Enabled</text:span></text:p>
      <text:p text:style-name="Text_20_body">When VS Code starts:</text:p>
      <text:p text:style-name="P5"><text:span text:style-name="Source_20_Text">Developer Mode Enabled</text:span></text:p>
      <text:p text:style-name="Horizontal_20_Line"/>
      <text:h text:style-name="Heading_20_1" text:outline-level="1">Phase 4: Build optimization features</text:h>
      <text:p text:style-name="Text_20_body">Examples:</text:p>
      <text:p text:style-name="Text_20_body">✅ Clear temp files</text:p>
      <text:p text:style-name="Text_20_body">✅ Kill selected background apps</text:p>
      <text:p text:style-name="Text_20_body">✅ Disable startup apps</text:p>
      <text:p text:style-name="Text_20_body"><text:soft-page-break/>✅ Clean cache</text:p>
      <text:p text:style-name="Text_20_body">✅ Restart Explorer</text:p>
      <text:p text:style-name="Text_20_body">✅ Show what's slowing the PC</text:p>
      <text:p text:style-name="Text_20_body">No AI yet—just useful utilities.</text:p>
      <text:p text:style-name="Horizontal_20_Line"/>
      <text:h text:style-name="Heading_20_1" text:outline-level="1">Phase 5: Integrate Ollama</text:h>
      <text:p text:style-name="Text_20_body">This is where AI comes in.</text:p>
      <text:p text:style-name="Text_20_body">Install Ollama and run a lightweight model such as Qwen or Gemma.</text:p>
      <text:p text:style-name="Text_20_body">Your app sends system information to the model.</text:p>
      <text:p text:style-name="Text_20_body">Example prompt:</text:p>
      <text:p text:style-name="Preformatted_20_Text"><text:span text:style-name="Source_20_Text">CPU: 95%</text:span></text:p>
      <text:p text:style-name="Preformatted_20_Text"><text:span text:style-name="Source_20_Text">RAM: 14GB /16GB</text:span></text:p>
      <text:p text:style-name="Preformatted_20_Text"><text:span text:style-name="Source_20_Text">GPU: 99%</text:span></text:p>
      <text:p text:style-name="Preformatted_20_Text"><text:span text:style-name="Source_20_Text">Processes:</text:span></text:p>
      <text:p text:style-name="Preformatted_20_Text"><text:span text:style-name="Source_20_Text">Chrome</text:span></text:p>
      <text:p text:style-name="Preformatted_20_Text"><text:span text:style-name="Source_20_Text">Discord</text:span></text:p>
      <text:p text:style-name="Preformatted_20_Text"><text:span text:style-name="Source_20_Text">Marvel Rivals</text:span></text:p>
      <text:p text:style-name="Preformatted_20_Text"/>
      <text:p text:style-name="P5"><text:span text:style-name="Source_20_Text">Why is my PC lagging?</text:span></text:p>
      <text:p text:style-name="Text_20_body">The AI explains the cause in plain English.</text:p>
      <text:p text:style-name="Horizontal_20_Line"/>
      <text:h text:style-name="Heading_20_1" text:outline-level="1">Phase 6: Give the AI tools</text:h>
      <text:p text:style-name="Text_20_body">Instead of only answering questions, let it perform actions—with your approval.</text:p>
      <text:p text:style-name="Text_20_body">Examples:</text:p>
      <text:p text:style-name="P5"><text:span text:style-name="Source_20_Text">Close Chrome</text:span></text:p>
      <text:p text:style-name="Text_20_body">↓</text:p>
      <text:p text:style-name="Text_20_body">AI asks:</text:p>
      <text:p text:style-name="Quotations">Chrome is using 5 GB of RAM. Do you want me to close it?</text:p>
      <text:p text:style-name="Text_20_body">You click <text:span text:style-name="Strong_20_Emphasis">Yes</text:span>.</text:p>
      <text:p text:style-name="Text_20_body">Node.js executes:</text:p>
      <text:p text:style-name="P5"><text:span text:style-name="Source_20_Text">taskkill /IM chrome.exe /F</text:span></text:p>
      <text:p text:style-name="Horizontal_20_Line"/>
      <text:h text:style-name="Heading_20_1" text:outline-level="1"><text:soft-page-break/>Phase 7: Make it feel like Jarvis</text:h>
      <text:p text:style-name="Text_20_body">Eventually add:</text:p>
      <text:list text:style-name="L6">
        <text:list-item>
          <text:p text:style-name="P7">Voice input</text:p>
        </text:list-item>
        <text:list-item>
          <text:p text:style-name="P7">Wake word</text:p>
        </text:list-item>
        <text:list-item>
          <text:p text:style-name="P7">Memory</text:p>
        </text:list-item>
        <text:list-item>
          <text:p text:style-name="P7">Conversation history</text:p>
        </text:list-item>
        <text:list-item>
          <text:p text:style-name="P7">Code assistant</text:p>
        </text:list-item>
        <text:list-item>
          <text:p text:style-name="P7">Game assistant</text:p>
        </text:list-item>
        <text:list-item>
          <text:p text:style-name="P7">System diagnostics</text:p>
        </text:list-item>
      </text:list>
      <text:p text:style-name="Horizontal_20_Line"/>
      <text:h text:style-name="Heading_20_1" text:outline-level="1">Skills to learn</text:h>
      <text:p text:style-name="Text_20_body">In roughly this order:</text:p>
      <text:list text:style-name="L7">
        <text:list-item>
          <text:p text:style-name="P8">Electron</text:p>
        </text:list-item>
        <text:list-item>
          <text:p text:style-name="P8">IPC</text:p>
        </text:list-item>
        <text:list-item>
          <text:p text:style-name="P8">Node.js desktop APIs</text:p>
        </text:list-item>
        <text:list-item>
          <text:p text:style-name="P8"><text:span text:style-name="Source_20_Text">systeminformation</text:span></text:p>
        </text:list-item>
        <text:list-item>
          <text:p text:style-name="P8">Windows PowerShell and WMI</text:p>
        </text:list-item>
        <text:list-item>
          <text:p text:style-name="P8">Windows process management</text:p>
        </text:list-item>
        <text:list-item>
          <text:p text:style-name="P8">Ollama</text:p>
        </text:list-item>
        <text:list-item>
          <text:p text:style-name="P8">Prompt engineering</text:p>
        </text:list-item>
        <text:list-item>
          <text:p text:style-name="P8">Model Context Protocol (MCP) or tool calling</text:p>
        </text:list-item>
        <text:list-item>
          <text:p text:style-name="P8">Retrieval-Augmented Generation (RAG)</text:p>
        </text:list-item>
      </text:list>
      <text:p text:style-name="Horizontal_20_Line"/>
      <text:h text:style-name="Heading_20_2" text:outline-level="2">If I were starting today</text:h>
      <text:p text:style-name="Text_20_body">I'd spend the <text:span text:style-name="Strong_20_Emphasis">first weekend</text:span> building something very small:</text:p>
      <text:p text:style-name="Preformatted_20_Text"><text:span text:style-name="Source_20_Text">AI PC Assistant</text:span></text:p>
      <text:p text:style-name="Preformatted_20_Text"><text:span text:style-name="Source_20_Text">│</text:span></text:p>
      <text:p text:style-name="Preformatted_20_Text"><text:span text:style-name="Source_20_Text">├── React UI</text:span></text:p>
      <text:p text:style-name="Preformatted_20_Text"><text:span text:style-name="Source_20_Text">├── Electron</text:span></text:p>
      <text:p text:style-name="Preformatted_20_Text"><text:span text:style-name="Source_20_Text">├── Show CPU %</text:span></text:p>
      <text:p text:style-name="Preformatted_20_Text"><text:span text:style-name="Source_20_Text">├── Show RAM %</text:span></text:p>
      <text:p text:style-name="Preformatted_20_Text"><text:span text:style-name="Source_20_Text">├── Show GPU %</text:span></text:p>
      <text:p text:style-name="Preformatted_20_Text"><text:span text:style-name="Source_20_Text">├── List running processes</text:span></text:p>
      <text:p text:style-name="P5"><text:span text:style-name="Source_20_Text">└── Refresh every second</text:span></text:p>
      <text:p text:style-name="Text_20_body"><text:soft-page-break/>No AI, no voice, no automation.</text:p>
      <text:p text:style-name="Text_20_body">Once that works, you've built the foundation that every other feature depends on.</text:p>
      <text:h text:style-name="Heading_20_3" text:outline-level="3">A long-term vision</text:h>
      <text:p text:style-name="Text_20_body">This could eventually become something like a combination of:</text:p>
      <text:list text:style-name="L8">
        <text:list-item>
          <text:p text:style-name="P9"><text:span text:style-name="Strong_20_Emphasis">MSI Afterburner</text:span> (hardware monitoring)</text:p>
        </text:list-item>
        <text:list-item>
          <text:p text:style-name="P9"><text:span text:style-name="Strong_20_Emphasis">Task Manager</text:span> (process management)</text:p>
        </text:list-item>
        <text:list-item>
          <text:p text:style-name="P9"><text:span text:style-name="Strong_20_Emphasis">Copilot/ChatGPT</text:span> (AI explanations)</text:p>
        </text:list-item>
        <text:list-item>
          <text:p text:style-name="P9"><text:span text:style-name="Strong_20_Emphasis">Discord overlay</text:span> (optional in-game assistance)</text:p>
        </text:list-item>
      </text:list>
      <text:p text:style-name="Text_20_body">That's an ambitious but realistic project for a solo developer if you build it incrementally instead of trying to create everything at onc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9T18:39:00.312913300</meta:creation-date>
    <dc:date>2026-07-09T18:39:27.622445000</dc:date>
    <meta:editing-duration>PT28S</meta:editing-duration>
    <meta:editing-cycles>1</meta:editing-cycles>
    <meta:generator>LibreOffice/26.2.4.2$Windows_X86_64 LibreOffice_project/0229ac93fcf0d7cbc6376066c6f35021cef002dc</meta:generator>
    <meta:document-statistic meta:table-count="0" meta:image-count="0" meta:object-count="0" meta:page-count="5" meta:paragraph-count="124" meta:word-count="547" meta:character-count="3028" meta:non-whitespace-character-count="2652"/>
  </office:meta>
</office:document-meta>
</file>